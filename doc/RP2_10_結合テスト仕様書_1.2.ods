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1.094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20_2_20_8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20_2_20_8">
      <style:table-cell-properties fo:wrap-option="wrap" fo:border="0.74pt solid #000000"/>
      <style:text-properties style:font-name="ＭＳ ゴシック" fo:font-size="9pt" style:font-name-asian="ＭＳ ゴシック" style:font-size-asian="9pt" style:font-size-complex="9pt"/>
    </style:style>
    <style:style style:name="ce8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標準_20_2_20_8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標準_20_2_20_8">
      <style:table-cell-properties fo:wrap-option="wrap" style:vertical-align="top"/>
      <style:text-properties style:font-name="ＭＳ ゴシック" fo:font-size="9pt" style:font-name-asian="ＭＳ ゴシック" style:font-size-asian="9pt" style:font-size-complex="9pt"/>
    </style:style>
    <style:style style:name="ce83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120" office:value-type="date" office:date-value="2026-06-25" calcext:value-type="date">
            <text:p>2026/06/25</text:p>
          </table:table-cell>
          <table:table-cell table:style-name="ce128" office:value-type="string" calcext:value-type="string">
            <text:p>新井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6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未登録ユーザーである、ID:"unknownUser"、PW:"wrongpass"を入力してログイン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エラーメッセージ「* ログインに失敗しました。」が表示され、ログイン画面のままの状態（画面遷移なし）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7" office:value-type="string" calcext:value-type="string" table:number-columns-spanned="23" table:number-rows-spanned="1">
            <text:p>よくある質問画面（http://localhost:8080/lms/faq/）でキーワード欄にワードを入力し、「検索」ボタンをクリックする。検索</text:p>
          </table:table-cell>
          <table:covered-table-cell table:number-columns-repeated="22" table:style-name="ce80"/>
          <table:table-cell table:style-name="ce66" office:value-type="string" calcext:value-type="string" table:number-columns-spanned="27" table:number-rows-spanned="1">
            <text:p>画面下段の検索結果に該当するキーワードを含む質問内容が表示される。キーワードに合致しない場合は「データが登録されていません。」の表示がされ、検索結果がある場合にはキーワードと一致しているか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81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81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よくある質問画面（http://localhost:8080/lms/faq/）でキーワード欄に”セルフ”を入力し、「検索」ボタンをクリック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画面下段の検索結果の項目一覧に質問「Q.セルフ・キャリアドック制度とは何か」が1件だけ表示される（画面タイトルは「よくある質問 | LMS」のまま）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82" office:value-type="string" calcext:value-type="string" table:number-columns-spanned="23" table:number-rows-spanned="1">
            <text:p>よくある質問画面（http://localhost:8080/lms/faq/）のカテゴリ検索のリンクをクリックし、下段の検索結果一覧の質問項目をクリックする。</text:p>
          </table:table-cell>
          <table:covered-table-cell table:number-columns-repeated="22" table:style-name="ce83"/>
          <table:table-cell table:style-name="ce66" office:value-type="string" calcext:value-type="string" table:number-columns-spanned="27" table:number-rows-spanned="1">
            <text:p>カテゴリ検索の項目をクリックし、検索結果の各質問をクリックし、質問別の回答が表示される。検索結果の質問文と回答文が一致するか確認する（正規化により”Q.”や”A.”は除去）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6:46:33.004969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7:19:32.141387500</dc:date>
    <meta:print-date>2025-02-21T15:24:43</meta:print-date>
    <meta:editing-duration>PT9H50M25S</meta:editing-duration>
    <meta:editing-cycles>56</meta:editing-cycles>
    <meta:generator>LibreOffice/26.2.4.2$Windows_X86_64 LibreOffice_project/0229ac93fcf0d7cbc6376066c6f35021cef002dc</meta:generator>
    <meta:document-statistic meta:table-count="19" meta:cell-count="509" meta:object-count="0"/>
  </office:meta>
</office:document-meta>
</file>