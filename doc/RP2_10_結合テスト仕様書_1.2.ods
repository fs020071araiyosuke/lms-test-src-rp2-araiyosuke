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76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1.094cm" fo:break-before="auto" style:use-optimal-row-height="true"/>
    </style:style>
    <style:style style:name="ro22" style:family="table-row">
      <style:table-row-properties style:row-height="0.746cm" fo:break-before="auto" style:use-optimal-row-height="true"/>
    </style:style>
    <style:style style:name="ro23" style:family="table-row">
      <style:table-row-properties style:row-height="1.058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標準_20_2_20_8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標準_20_2_20_8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標準_20_2_20_8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標準_20_2_20_8">
      <style:table-cell-properties fo:wrap-option="wrap" fo:border="0.74pt solid #000000"/>
      <style:text-properties style:font-name="ＭＳ ゴシック" fo:font-size="9pt" style:font-name-asian="ＭＳ ゴシック" style:font-size-asian="9pt" style:font-size-complex="9pt"/>
    </style:style>
    <style:style style:name="ce80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標準_20_2_20_8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標準_20_2_20_8">
      <style:table-cell-properties fo:wrap-option="wrap"/>
      <style:text-properties style:font-name="ＭＳ ゴシック" fo:font-size="9pt" style:font-name-asian="ＭＳ ゴシック" style:font-size-asian="9pt" style:font-size-complex="9pt"/>
    </style:style>
    <style:style style:name="ce83" style:family="table-cell" style:parent-style-name="標準_20_2_20_8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 style:parent-style-name="Note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-offset-x="0.1cm" draw:shadow-offset-y="0.1cm" draw:shadow-color="#000000" draw:caption-escape-direction="auto" loext:decorative="false"/>
      <style:paragraph-properties style:writing-mode="lr-tb"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lef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05"/>
        <table:table-column table:style-name="co2" table:number-columns-repeated="2" table:default-cell-style-name="ce105"/>
        <table:table-column table:style-name="co3" table:default-cell-style-name="ce105"/>
        <table:table-column table:style-name="co4" table:default-cell-style-name="ce131"/>
        <table:table-column table:style-name="co5" table:number-columns-repeated="252" table:default-cell-style-name="ce131"/>
        <table:table-column table:style-name="co5" table:number-columns-repeated="16127"/>
        <table:table-row table:style-name="ro1" table:number-rows-repeated="3">
          <table:table-cell table:number-columns-repeated="257"/>
        </table:table-row>
        <table:table-row table:style-name="ro2">
          <table:table-cell/>
          <table:table-cell table:style-name="ce115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3">
          <table:table-cell/>
          <table:table-cell table:style-name="ce116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4">
          <table:table-cell/>
          <table:table-cell table:style-name="ce116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5">
          <table:table-cell/>
          <table:table-cell table:style-name="ce117" office:value-type="string" calcext:value-type="string">
            <text:p>更新履歴</text:p>
          </table:table-cell>
          <table:table-cell table:style-name="ce117" table:number-columns-repeated="2"/>
          <table:table-cell table:number-columns-repeated="253"/>
        </table:table-row>
        <table:table-row table:style-name="ro6">
          <table:table-cell/>
          <table:table-cell table:style-name="ce118" office:value-type="string" calcext:value-type="string">
            <text:p>年月日</text:p>
          </table:table-cell>
          <table:table-cell table:style-name="ce118" office:value-type="string" calcext:value-type="string">
            <text:p>担当者</text:p>
          </table:table-cell>
          <table:table-cell table:style-name="ce118" office:value-type="string" calcext:value-type="string">
            <text:p>内容</text:p>
          </table:table-cell>
          <table:table-cell table:number-columns-repeated="253"/>
        </table:table-row>
        <table:table-row table:style-name="ro6">
          <table:table-cell/>
          <table:table-cell table:style-name="ce120" office:value-type="date" office:date-value="2026-06-25" calcext:value-type="date">
            <text:p>2026/06/25</text:p>
          </table:table-cell>
          <table:table-cell table:style-name="ce128" office:value-type="string" calcext:value-type="string">
            <text:p>新井</text:p>
          </table:table-cell>
          <table:table-cell table:style-name="ce128" office:value-type="string" calcext:value-type="string">
            <text:p>新規作成</text:p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120"/>
          <table:table-cell table:style-name="ce128" table:number-columns-repeated="2"/>
          <table:table-cell table:number-columns-repeated="253"/>
        </table:table-row>
        <table:table-row table:style-name="ro7" table:number-rows-repeated="5">
          <table:table-cell/>
          <table:table-cell table:style-name="ce117" table:number-columns-repeated="3"/>
          <table:table-cell table:number-columns-repeated="253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48" table:default-cell-style-name="ce134"/>
        <table:table-column table:style-name="co7" table:default-cell-style-name="ce176"/>
        <table:table-column table:style-name="co6" table:number-columns-repeated="199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135" office:value-type="string" calcext:value-type="string">
            <text:p>テストケース一覧</text:p>
          </table:table-cell>
          <table:table-cell table:style-name="ce135"/>
          <table:table-cell table:style-name="ce139"/>
          <table:table-cell table:style-name="ce142" table:number-columns-repeated="5"/>
          <table:table-cell table:style-name="ce133" table:number-columns-repeated="48"/>
          <table:table-cell table:style-name="ce177"/>
          <table:table-cell table:style-name="ce181" table:number-columns-repeated="16326"/>
        </table:table-row>
        <table:table-row table:style-name="ro1">
          <table:table-cell table:number-columns-repeated="54"/>
          <table:table-cell table:style-name="ce174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ケース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145"/>
          <table:covered-table-cell table:style-name="ce147"/>
          <table:table-cell table:style-name="ce21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145"/>
          <table:covered-table-cell table:style-name="ce147"/>
          <table:table-cell table:style-name="ce21" office:value-type="string" calcext:value-type="string" table:number-columns-spanned="31" table:number-rows-spanned="1">
            <text:p>概要</text:p>
          </table:table-cell>
          <table:covered-table-cell table:number-columns-repeated="29" table:style-name="ce145"/>
          <table:covered-table-cell table:style-name="ce147"/>
          <table:table-cell table:number-columns-repeated="2"/>
          <table:table-cell table:style-name="ce178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1" table:style-name="ce150"/>
          <table:covered-table-cell table:style-name="ce16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1" table:style-name="ce151"/>
          <table:covered-table-cell table:style-name="ce16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1" table:style-name="ce152"/>
          <table:covered-table-cell table:style-name="ce16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15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15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155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15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15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15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15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13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16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13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16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13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16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13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16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16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13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65"/>
          <table:covered-table-cell table:style-name="ce17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1" table:style-name="ce166"/>
          <table:covered-table-cell table:style-name="ce17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4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74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2"/>
          <table:table-cell table:number-columns-repeated="191"/>
        </table:table-row>
        <table:table-row table:style-name="ro6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未登録ユーザーである、ID:"unknownUser"、PW:"wrongpass"を入力してログインボタン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エラーメッセージ「* ログインに失敗しました。」が表示され、ログイン画面のままの状態（画面遷移なし）であることを確認する。</text:p>
          </table:table-cell>
          <table:covered-table-cell table:number-columns-repeated="26" table:style-name="ce66"/>
          <table:table-cell table:style-name="ce72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5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74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3"/>
          <table:table-cell table:number-columns-repeated="191"/>
        </table:table-row>
        <table:table-row table:style-name="ro2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既登録ユーザーである、ID:"StudentAA01"、PW:"Yousuke6"を入力してログインボタンを押下し、URL（http://localhost:8080/lms/course/detail/)にアクセスする。 <text:s text:c="7"/></text:p>
          </table:table-cell>
          <table:covered-table-cell table:number-columns-repeated="22" table:style-name="ce75"/>
          <table:table-cell table:style-name="ce66" office:value-type="string" calcext:value-type="string" table:number-columns-spanned="27" table:number-rows-spanned="1">
            <text:p>コース詳細画面へ遷移し、タイトルが「コース詳細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6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74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2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既登録ユーザーである、ID:"StudentAA01"、PW:"Yousuke6"を入力してログインボタンを押下し、URL（http://localhost:8080/lms/course/detail/)にアクセスする。 <text:s text:c="7"/></text:p>
          </table:table-cell>
          <table:covered-table-cell table:number-columns-repeated="22" table:style-name="ce75"/>
          <table:table-cell table:style-name="ce66" office:value-type="string" calcext:value-type="string" table:number-columns-spanned="27" table:number-rows-spanned="1">
            <text:p>コース詳細画面へ遷移し、タイトルが「コース詳細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上部メニューの「機能」タブメニューから、「ヘルプ」ボタンをクリックし、URL（http://localhost:8080/lms/help/）にアクセス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に遷移し、タイトルが「ヘルプ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76" office:value-type="string" calcext:value-type="string" table:number-columns-spanned="23" table:number-rows-spanned="1">
            <text:p>ヘルプ画面の下部の「よくある質問」リンクをクリックし、 URL（http://localhost:8080/lms/faq/）にアクセスする。</text:p>
          </table:table-cell>
          <table:covered-table-cell table:number-columns-repeated="22" table:style-name="ce76"/>
          <table:table-cell table:style-name="ce66" office:value-type="string" calcext:value-type="string" table:number-columns-spanned="27" table:number-rows-spanned="1">
            <text:p>追加の別タブでよくある質問画面に遷移し、タイトルが「よくある質問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7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4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74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2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既登録ユーザーである、ID:"StudentAA01"、PW:"Yousuke6"を入力してログインボタンを押下し、URL（http://localhost:8080/lms/course/detail/)にアクセスする。 <text:s text:c="7"/></text:p>
          </table:table-cell>
          <table:covered-table-cell table:number-columns-repeated="22" table:style-name="ce75"/>
          <table:table-cell table:style-name="ce66" office:value-type="string" calcext:value-type="string" table:number-columns-spanned="27" table:number-rows-spanned="1">
            <text:p>コース詳細画面へ遷移し、タイトルが「コース詳細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上部メニューの「機能」タブメニューから、「ヘルプ」ボタンをクリックし、URL（http://localhost:8080/lms/help/）にアクセス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に遷移し、タイトルが「ヘルプ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22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ヘルプ画面の下部の「よくある質問」リンクをクリックし、 URL（http://localhost:8080/lms/faq/）にアクセスする。</text:p>
          </table:table-cell>
          <table:covered-table-cell table:number-columns-repeated="22" table:style-name="ce75"/>
          <table:table-cell table:style-name="ce66" office:value-type="string" calcext:value-type="string" table:number-columns-spanned="27" table:number-rows-spanned="1">
            <text:p>追加の別タブでよくある質問画面に遷移し、タイトルが「よくある質問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23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77" office:value-type="string" calcext:value-type="string" table:number-columns-spanned="23" table:number-rows-spanned="1">
            <text:p>よくある質問画面（http://localhost:8080/lms/faq/）でキーワード欄にワードを入力し、「検索」ボタンをクリックする。検索</text:p>
          </table:table-cell>
          <table:covered-table-cell table:number-columns-repeated="22" table:style-name="ce80"/>
          <table:table-cell table:style-name="ce66" office:value-type="string" calcext:value-type="string" table:number-columns-spanned="27" table:number-rows-spanned="1">
            <text:p>画面下段の検索結果に該当するキーワードを含む質問内容が表示される。キーワードに合致しない場合は「データが登録されていません。」の表示がされ、検索結果がある場合にはキーワードと一致しているか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8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81" office:value-type="string" calcext:value-type="string" table:number-columns-spanned="23" table:number-rows-spanned="1">
            <text:p>URL(http://localhost:8080/lms/)にアクセスする。</text:p>
          </table:table-cell>
          <table:covered-table-cell table:number-columns-repeated="22" table:style-name="ce81"/>
          <table:table-cell table:style-name="ce66" office:value-type="string" calcext:value-type="string" table:number-columns-spanned="27" table:number-rows-spanned="1">
            <text:p>トップページにアクセスし、タイトルが「ログイン｜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2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既登録ユーザーである、ID:"StudentAA01"、PW:"Yousuke6"を入力してログインボタンを押下し、URL（http://localhost:8080/lms/course/detail/)にアクセスする。 <text:s text:c="7"/></text:p>
          </table:table-cell>
          <table:covered-table-cell table:number-columns-repeated="22" table:style-name="ce75"/>
          <table:table-cell table:style-name="ce66" office:value-type="string" calcext:value-type="string" table:number-columns-spanned="27" table:number-rows-spanned="1">
            <text:p>コース詳細画面へ遷移し、タイトルが「コース詳細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上部メニューの「機能」タブメニューから、「ヘルプ」ボタンをクリックし、URL（http://localhost:8080/lms/help/）にアクセス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に遷移し、タイトルが「ヘルプ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76" office:value-type="string" calcext:value-type="string" table:number-columns-spanned="23" table:number-rows-spanned="1">
            <text:p>ヘルプ画面の下部の「よくある質問」リンクをクリックし、 URL（http://localhost:8080/lms/faq/）にアクセスする。</text:p>
          </table:table-cell>
          <table:covered-table-cell table:number-columns-repeated="22" table:style-name="ce76"/>
          <table:table-cell table:style-name="ce66" office:value-type="string" calcext:value-type="string" table:number-columns-spanned="27" table:number-rows-spanned="1">
            <text:p>追加の別タブでよくある質問画面に遷移し、タイトルが「よくある質問 | LMS」であることを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6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よくある質問画面（http://localhost:8080/lms/faq/）でキーワード欄に”セルフ”を入力し、「検索」ボタンをクリック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画面下段の検索結果の項目一覧に質問「Q.セルフ・キャリアドック制度とは何か」が1件だけ表示される（画面タイトルは「よくある質問 | LMS」のまま）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22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84" office:value-type="string" calcext:value-type="string" table:number-columns-spanned="23" table:number-rows-spanned="1">
            <text:p>よくある質問画面（http://localhost:8080/lms/faq/）のカテゴリ検索のリンクをクリックし、下段の検索結果一覧の質問項目をクリックする。</text:p>
          </table:table-cell>
          <table:covered-table-cell table:number-columns-repeated="22" table:style-name="ce83"/>
          <table:table-cell table:style-name="ce66" office:value-type="string" calcext:value-type="string" table:number-columns-spanned="27" table:number-rows-spanned="1">
            <text:p>カテゴリ検索の項目をクリックし、検索結果の各質問をクリックし、質問別の回答が表示される。検索結果の質問文と回答文が部分一致するか確認する。</text:p>
          </table:table-cell>
          <table:covered-table-cell table:number-columns-repeated="26" table:style-name="ce66"/>
          <table:table-cell table:style-name="ce72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2"/>
          <table:table-cell table:style-name="ce73" office:value-type="string" calcext:value-type="string" table:number-columns-spanned="4" table:number-rows-spanned="1">
            <text:p>新井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9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0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1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2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86" table:number-columns-spanned="5" table:number-rows-spanned="1"/>
          <table:covered-table-cell table:number-columns-repeated="4" table:style-name="ce86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管理者アカウントでログイン</text:span></text:p>
              <text:p text:style-name="P1"><text:span text:style-name="T1"/></text:p>
              <text:p text:style-name="P1"><text:span text:style-name="T1">②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3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86" table:number-columns-spanned="5" table:number-rows-spanned="1"/>
          <table:covered-table-cell table:number-columns-repeated="4" table:style-name="ce86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4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86" table:number-columns-spanned="5" table:number-rows-spanned="1"/>
          <table:covered-table-cell table:number-columns-repeated="4" table:style-name="ce86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5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6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7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8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19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72" table:number-columns-spanned="5" table:number-rows-spanned="1"/>
          <table:covered-table-cell table:number-columns-repeated="4" table:style-name="ce72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number:number-style style:name="N10130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0130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013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013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013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00/00/00</text:date>, <text:time style:data-style-name="N2" text:time-value="10:18:32.4948028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25T10:19:38.048116500</dc:date>
    <meta:print-date>2025-02-21T15:24:43</meta:print-date>
    <meta:editing-duration>PT9H17M26S</meta:editing-duration>
    <meta:editing-cycles>54</meta:editing-cycles>
    <meta:generator>LibreOffice/26.2.4.2$Windows_X86_64 LibreOffice_project/0229ac93fcf0d7cbc6376066c6f35021cef002dc</meta:generator>
    <meta:document-statistic meta:table-count="19" meta:cell-count="509" meta:object-count="0"/>
  </office:meta>
</office:document-meta>
</file>